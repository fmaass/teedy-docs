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" manifest:media-type=""/>
  <manifest:file-entry manifest:full-path="Pictures/bg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cf8" officeooo:paragraph-rsid="0014f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ipsum dolor sit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background-image xlink:href="Pictures/bg.png" xlink:type="simple" xlink:actuate="onLoad" style:position="center center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58:10.865000000</meta:creation-date>
    <dc:date>2015-12-07T22:58:28.04900000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5.0.1.2$Windows_x86 LibreOffice_project/81898c9f5c0d43f3473ba111d7b351050be20261</meta:generator>
  </office:meta>
</office:document-meta>
</file>